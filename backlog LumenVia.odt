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3" style:parent-style-name="Normal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4" style:parent-style-name="Normal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5" style:parent-style-name="Policepardéfau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6" style:parent-style-name="Policepardéfau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7" style:parent-style-name="Policepardéfaut" style:family="text">
      <style:text-properties style:font-name="Arial" style:font-name-complex="Arial" style:text-line-through-style="solid" style:text-line-through-width="auto" style:text-line-through-color="font-color" style:text-line-through-mode="continuous" style:text-line-through-type="single"/>
    </style:style>
    <style:style style:name="T8" style:parent-style-name="Policepardéfau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9" style:parent-style-name="Policepardéfaut" style:family="text">
      <style:text-properties style:font-name="Arial" style:font-name-complex="Arial" style:text-line-through-style="solid" style:text-line-through-width="auto" style:text-line-through-color="font-color" style:text-line-through-mode="continuous" style:text-line-through-type="single"/>
    </style:style>
    <style:style style:name="T10" style:parent-style-name="Policepardéfau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11" style:parent-style-name="Normal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12" style:parent-style-name="Policepardéfaut" style:family="text">
      <style:text-properties style:font-name="Tahoma" style:font-name-complex="Tahoma"/>
    </style:style>
    <style:style style:name="T13" style:parent-style-name="Policepardéfau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14" style:parent-style-name="Normal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15" style:parent-style-name="Normal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16" style:parent-style-name="Normal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17" style:parent-style-name="Normal" style:list-style-name="LFO1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18" style:parent-style-name="Normal" style:list-style-name="LFO1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19" style:parent-style-name="Normal" style:family="paragraph">
      <style:text-properties style:text-line-through-style="solid" style:text-line-through-width="auto" style:text-line-through-color="font-color" style:text-line-through-mode="continuous" style:text-line-through-type="single"/>
    </style:style>
  </office:automatic-styles>
  <office:body>
    <office:text text:use-soft-page-breaks="true">
      <text:p text:style-name="P1">La Passerelle catéchèse — L’écho des paraboles est trop légère et mal présenté<text:line-break/>En fait générer le PDF au même moment où on génère le contenu, ça prend pas beaucoup plus de temps</text:p>
      <text:p text:style-name="Normal">En fait les règles d’utilisation des promptes, notamment quand on en rajoute, il n’est pas très clair est-ce que ce n’est que du cumulatif mais par exemple est-ce que ça suffit si c’est le cas</text:p>
      <text:p text:style-name="P2">à retenir du Psaume</text:p>
      <text:p text:style-name="P3">En cercle le visuel dans la fresque</text:p>
      <text:p text:style-name="P4">Titre du PDF sur deux ligne: 14ème Dimanche du Temps Ordinaire (semaine II du Psautier)</text:p>
      <text:p text:style-name="Normal"><text:span text:style-name="T5">Comme sur le site, l’habillage de couleur doit être à la couleur de la semaine </text:span></text:p>
      <text:p text:style-name="Normal"/>
      <text:p text:style-name="Normal"><text:span text:style-name="T6">Supprimer le texte dans la simulation, écran mobile suivant : « L’iframe charge une nouvelle session : connexion utilisateur/admin non partagée avec cet onglet. Le paramètre lumenvia_narrow_nav=1 force le mode «</text:span><text:span text:style-name="T7"> </text:span><text:span text:style-name="T8">Menu</text:span><text:span text:style-name="T9"> </text:span><text:span text:style-name="T10">» seul (les media queries suivent souvent la fenêtre parente, pas la largeur du cadre). »</text:span></text:p>
      <text:p text:style-name="P11">Est-ce que le simulateur d’écran mobile sur le mobile est pertinent ?</text:p>
      <text:p text:style-name="Normal"><text:span text:style-name="T12">﻿</text:span><text:s/><text:span text:style-name="T13">Manque le footer en mobile</text:span></text:p>
      <text:p text:style-name="P14">Remplace « Trois formats disponibles — JOPAI LumenVia pour vous préparer<text:line-break/>à la célébration du dimanche 10 mai 2026 » par « Trois formats disponibles proposé par JOPAI LumenVia pour vous préparer à la célébration du dimanche 10 mai 2026 »<text:line-break/>&gt;&gt; en écrivant JOPAI avec la règle de formattage</text:p>
      <text:p text:style-name="P15">Supprime tout ce bloc « Pourquoi plusieurs lignes dans Google Sheets ?</text:p>
      <text:p text:style-name="P16">Les tables sont append-only : chaque événement peut créer une nouvelle ligneavec un nouvel historique,<text:line-break/>sans effacer les anciennes versions.</text:p>
      <text:list text:style-name="LFO1" text:continue-numbering="true">
        <text:list-item>
          <text:p text:style-name="P17">users : identité stable par e-mail (entity_id = empreinte de l’e-mail).<text:line-break/>On n’ajoute une ligne « utilisateur » que si aucune ligne n’existe encore pour cet e-mail (ex. première inscription newsletter sans compte mémo).</text:p>
        </text:list-item>
        <text:list-item>
          <text:p text:style-name="P18">subscriptions : préférences d’envoi (newsletter). C’est ici que l’abonnement hebdomadaire est stocké, relié à user_entity_id.</text:p>
        </text:list-item>
      </text:list>
      <text:p text:style-name="P19">Si tu testes plusieurs fois « S’abonner », tu ne devrais plus voir de doublons inutiles dans users ; seule la table subscriptionsreçoit une nouvelle ligne si tu réactives un abonnement après désactivation (futur). »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cques paul</meta:initial-creator>
    <dc:creator>jacques paul</dc:creator>
    <meta:creation-date>2026-05-08T07:42:00Z</meta:creation-date>
    <dc:date>2026-05-08T08:09:00Z</dc:date>
    <meta:template xlink:href="Normal.dotm" xlink:type="simple"/>
    <meta:editing-cycles>1</meta:editing-cycles>
    <meta:editing-duration>PT1620S</meta:editing-duration>
    <meta:document-statistic meta:page-count="1" meta:paragraph-count="4" meta:word-count="316" meta:character-count="2055" meta:row-count="14" meta:non-whitespace-character-count="1743"/>
  </office:meta>
</office:document-meta>
</file>